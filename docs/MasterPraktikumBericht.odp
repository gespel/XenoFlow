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B000001B0C2B1A27A.png" manifest:media-type="image/png"/>
  <manifest:file-entry manifest:full-path="Pictures/1000000000000500000002B62DB54A6E.jpg" manifest:media-type="image/jpeg"/>
  <manifest:file-entry manifest:full-path="Pictures/10000001000010A800000491A11FC32D.png" manifest:media-type="image/png"/>
  <manifest:file-entry manifest:full-path="Pictures/1000000100001388000005F87CF143AF.png" manifest:media-type="image/png"/>
  <manifest:file-entry manifest:full-path="Pictures/1000000000000500000002591E24C472.jpg" manifest:media-type="image/jpeg"/>
  <manifest:file-entry manifest:full-path="Pictures/10000001000005310000038F16B0F45B.png" manifest:media-type="image/png"/>
  <manifest:file-entry manifest:full-path="Pictures/10000001000003C00000030075EAA883.png" manifest:media-type="image/png"/>
  <manifest:file-entry manifest:full-path="Pictures/10000000000004940000024918356805.jpg" manifest:media-type="image/jpeg"/>
  <manifest:file-entry manifest:full-path="Pictures/100000000000092B0000056F3F389F63.jpg" manifest:media-type="image/jpeg"/>
  <manifest:file-entry manifest:full-path="Pictures/1000000100001388000005F84700B506.png" manifest:media-type="image/png"/>
  <manifest:file-entry manifest:full-path="Pictures/10000000000005A000000379EA0DAAE9.png" manifest:media-type="image/png"/>
  <manifest:file-entry manifest:full-path="Pictures/100043860000771000004F60E92DD1C1.pdf" manifest:media-type="application/pdf"/>
  <manifest:file-entry manifest:full-path="Pictures/100000010000048000000300FA6162D6.png" manifest:media-type="image/png"/>
  <manifest:file-entry manifest:full-path="Pictures/10000001000006C100000104574B3A5D.png" manifest:media-type="image/png"/>
  <manifest:file-entry manifest:full-path="Pictures/100031230000633800003B8827E1C1AF.pdf" manifest:media-type="application/pdf"/>
  <manifest:file-entry manifest:full-path="Pictures/100000010000059F000002A5DA63FEEC.png" manifest:media-type="image/png"/>
  <manifest:file-entry manifest:full-path="Pictures/10000001000003C000000240121FA99B.png" manifest:media-type="image/png"/>
  <manifest:file-entry manifest:full-path="Pictures/10002BAE0000633800004F6054F36046.pdf" manifest:media-type="application/pdf"/>
  <manifest:file-entry manifest:full-path="Pictures/10000000000005000000017A255F059E.jpg" manifest:media-type="image/jpeg"/>
  <manifest:file-entry manifest:full-path="Pictures/10000000000002DA0000035C67902FEC.jpg" manifest:media-type="image/jpeg"/>
  <manifest:file-entry manifest:full-path="Pictures/1000000100000CC800000628D92421AF.png" manifest:media-type="image/png"/>
  <manifest:file-entry manifest:full-path="Pictures/1000000100000579000001737F938937.png" manifest:media-type="image/png"/>
  <manifest:file-entry manifest:full-path="Pictures/10000001000005E400000309242396D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84cm, 1.701cm, 4.277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65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5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45cm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8.9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0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1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812cm, 0cm, 0cm)" draw:image-opacity="100%" style:mirror="none" loext:decorative="false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color="#00a933" draw:marker-end="Arrowheads_20_6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a933" draw:marker-end="Arrowheads_20_7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036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3" style:family="presentation" style:parent-style-name="Titel_20_und_20_Inha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Benutzerdefiniertes_20_Layou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21pt" style:font-size-asian="21pt" style:font-size-complex="21pt"/>
    </style:style>
    <style:style style:name="P3" style:family="paragraph">
      <style:paragraph-properties fo:margin-left="0.953cm" fo:margin-right="0cm" fo:margin-top="0.113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P5" style:family="paragraph">
      <loext:graphic-properties draw:fill="none"/>
      <style:paragraph-properties fo:text-align="lef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9" style:family="paragraph"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0" style:family="paragraph">
      <loext:graphic-properties draw:fill="solid" draw:fill-color="#ffffff"/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3" style:family="paragraph">
      <loext:graphic-properties draw:fill="solid" draw:fill-color="#ffffff"/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11pt" style:font-size-asian="11pt" style:font-size-complex="11pt"/>
    </style:style>
    <style:style style:name="P16" style:family="paragraph">
      <style:paragraph-properties fo:margin-top="0.42cm" fo:margin-bottom="0.35cm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paragraph-properties fo:margin-top="0.42cm" fo:margin-bottom="0.35cm"/>
      <style:text-properties fo:font-size="7pt" style:font-size-asian="7pt" style:font-size-complex="7pt"/>
    </style:style>
    <style:style style:name="P18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9" style:family="paragraph">
      <style:text-properties fo:font-size="7pt" style:font-size-asian="7pt" style:font-size-complex="7pt"/>
    </style:style>
    <style:style style:name="P20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bold" fo:background-color="transparent" style:font-name-asian="Verdana1" style:font-size-asian="21pt" style:font-style-asian="normal" style:font-weight-asian="bold" style:font-name-complex="Calibri" style:font-size-complex="21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font-weight="normal" fo:background-color="transparent" style:font-name-asian="Verdana1" style:font-size-asian="20pt" style:font-style-asian="italic" style:font-weight-asian="normal" style:font-name-complex="Verdana" style:font-size-complex="20pt" style:font-style-complex="italic" style:font-weight-complex="normal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fo:background-color="transparent" style:font-name-asian="Verdana1" style:font-size-asian="20pt" style:font-style-asian="normal" style:font-weight-asian="bold" style:font-name-complex="Verdana" style:font-size-complex="20pt" style:font-style-complex="normal" style:font-weight-complex="bold"/>
    </style:style>
    <style:style style:name="T1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style:style style:name="T1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background-color="transparent" style:font-name-asian="Verdana1" style:font-size-asian="20pt" style:font-style-asian="italic" style:font-name-complex="Verdana" style:font-size-complex="20pt" style:font-style-complex="italic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315e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fo:color="#00206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Überschrift" draw:style-name="dp1" draw:master-page-name="Titel_20_und_20_Inhalt" presentation:presentation-page-layout-name="AL1T11">
        <office:forms form:automatic-focus="false" form:apply-design-mode="false"/>
        <draw:frame draw:name="Titel 4" presentation:style-name="pr1" draw:text-style-name="P2" draw:layer="layout" svg:width="22.511cm" svg:height="0.507cm" svg:x="1.499cm" svg:y="11.564cm" presentation:class="title" presentation:user-transformed="true">
          <draw:text-box>
            <text:p text:style-name="P1"><text:span text:style-name="T1">Performance Boundaries and Architectural Constraints of the BlueField-3 </text:span></text:p>
          </draw:text-box>
        </draw:frame>
        <draw:frame draw:name="Inhaltsplatzhalter 2" presentation:style-name="pr2" draw:text-style-name="P4" draw:layer="layout" svg:width="22.111cm" svg:height="0.811cm" svg:x="1.499cm" svg:y="12.782cm" presentation:class="outline" presentation:user-transformed="true">
          <draw:text-box>
            <text:p text:style-name="P3"><text:span text:style-name="T2">Sten Heimbrodt, </text:span><text:span text:style-name="T3">Master Praktikumsbericht</text:span></text:p>
          </draw:text-box>
        </draw:frame>
        <draw:frame draw:name="Grafik 7" draw:style-name="gr1" draw:text-style-name="P5" draw:layer="layout" svg:width="25.403cm" svg:height="7.6cm" svg:x="-0.013cm" svg:y="2.943cm">
          <draw:image xlink:href="Pictures/100000000000092B0000056F3F389F6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nutzerdefiniertes_20_Layout">
        <office:forms form:automatic-focus="false" form:apply-design-mode="false"/>
        <draw:custom-shape draw:name="Titel 4" draw:style-name="gr3" draw:text-style-name="P8" draw:layer="layout" svg:width="22.511cm" svg:height="0.899cm" svg:x="1.499cm" svg:y="1.593cm">
          <text:p text:style-name="P7"><text:span text:style-name="T4">Gliederu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" draw:style-name="gr4" draw:text-style-name="P10" draw:layer="layout" svg:width="22.111cm" svg:height="10.557cm" svg:x="1.589cm" svg:y="2.943cm">
          <text:list text:style-name="L5">
            <text:list-item>
              <text:p text:style-name="P9"><text:span text:style-name="T5">Was bisher geschah…</text:span><text:span text:style-name="T6"> und Refresher DOCA Flow</text:span></text:p>
              <text:p text:style-name="P9"><text:span text:style-name="T6">→ Pipe, Entry Semantik</text:span></text:p>
              <text:p text:style-name="P9"><text:span text:style-name="T6">→ Stand XenoFlow 0.1</text:span></text:p>
            </text:list-item>
            <text:list-item>
              <text:p text:style-name="P9"><text:span text:style-name="T6">BlueField Architektur</text:span></text:p>
            </text:list-item>
            <text:list-item>
              <text:p text:style-name="P9"><text:span text:style-name="T6">Experimente</text:span></text:p>
              <text:p text:style-name="P9"><text:span text:style-name="T6">→ ebpf_mac_rewrite</text:span></text:p>
              <text:p text:style-name="P9"><text:span text:style-name="T6">→ entry_latency</text:span></text:p>
              <text:p text:style-name="P9"><text:span text:style-name="T6">→ max_pipes</text:span></text:p>
              <text:p text:style-name="P9"><text:span text:style-name="T6">→ max_entries</text:span></text:p>
              <text:p text:style-name="P9"><text:span text:style-name="T6">→ hash_pipe</text:span></text:p>
              <text:p text:style-name="P9"><text:span text:style-name="T6">→ pcc</text:span></text:p>
            </text:list-item>
            <text:list-item>
              <text:p text:style-name="P9"><text:span text:style-name="T6">Sonstiges und Ausblic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cm">
          <draw:text-box>
            <text:p><text:span text:style-name="T7">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nutzerdefiniertes_20_Layout">
        <office:forms form:automatic-focus="false" form:apply-design-mode="false"/>
        <draw:custom-shape draw:name="Titel 3" draw:style-name="gr6" draw:text-style-name="P8" draw:layer="layout" svg:width="22.511cm" svg:height="0.899cm" svg:x="1.499cm" svg:y="1.593cm">
          <text:p text:style-name="P7"><text:span text:style-name="T4">DOCA F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3" draw:style-name="gr7" draw:text-style-name="P13" draw:layer="layout" svg:width="22.111cm" svg:height="5.556cm" svg:x="1.59cm" svg:y="2.944cm">
          <text:list text:style-name="L5">
            <text:list-header>
              <text:p text:style-name="P12"><text:span text:style-name="T6">„DOCA Flow is the most fundamental API for building generic packet processing pipes in hardware. The DOCA Flow library provides an API for building a set of pipes, where each pipe consists of match criteria, monitoring, and a set of actions. Pipes can be chained so that after a pipe-defined action is executed, the packet may proceed to another pipe.“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nutzerdefiniertes_20_Layout">
        <office:forms form:automatic-focus="false" form:apply-design-mode="false"/>
        <draw:frame draw:style-name="gr8" draw:text-style-name="P14" draw:layer="layout" svg:width="17.5cm" svg:height="10.804cm" svg:x="4.3cm" svg:y="2cm">
          <draw:image xlink:href="Pictures/10000000000005A000000379EA0DAAE9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3</text:span></text:p>
          </draw:text-box>
        </draw:frame>
        <draw:frame draw:style-name="gr9" draw:text-style-name="P11" draw:layer="layout" svg:width="11cm" svg:height="0.78cm" svg:x="7.3cm" svg:y="12.8cm">
          <draw:text-box>
            <text:p text:style-name="P15"><text:span text:style-name="T7">https://docs.nvidia.com/doca/sdk/doca-flow/index.html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nutzerdefiniertes_20_Layout">
        <office:forms form:automatic-focus="false" form:apply-design-mode="false"/>
        <draw:custom-shape draw:name="Titel 1" draw:style-name="gr10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" draw:style-name="gr11" draw:text-style-name="P10" draw:layer="layout" svg:width="22.111cm" svg:height="10.057cm" svg:x="1.589cm" svg:y="2.943cm">
          <text:list text:style-name="L5">
            <text:list-item>
              <text:p text:style-name="P9"><text:span text:style-name="T6">Implementierung eines Load-Balancers im Rahmen der Bachelorarbeit Q1 2025</text:span></text:p>
            </text:list-item>
            <text:list-item>
              <text:p text:style-name="P9"><text:span text:style-name="T6">Verwendung von DOCA Flow als einzige Abhänigkeit</text:span></text:p>
            </text:list-item>
            <text:list-item>
              <text:p text:style-name="P9"><text:span text:style-name="T6">Statischer L3 Load-Balancer mit 4-Tuple Match</text:span></text:p>
            </text:list-item>
            <text:list-item>
              <text:p text:style-name="P9"><text:span text:style-name="T8">95 Millionen Pakete pro Sekunde Verarbeitung </text:span></text:p>
              <text:p text:style-name="P9"><text:span text:style-name="T8">→ </text:span><text:span text:style-name="T6">(98 Millionen bei size &lt; 64)</text:span></text:p>
              <text:p text:style-name="P9"><text:span text:style-name="T6"/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nutzerdefiniertes_20_Layout">
        <office:forms form:automatic-focus="false" form:apply-design-mode="false"/>
        <draw:custom-shape draw:name="Titel 2" draw:style-name="gr12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1.5cm" svg:height="7.667cm" svg:x="1cm" svg:y="4.5cm">
          <draw:image xlink:href="Pictures/100043860000771000004F60E92DD1C1.pdf" xlink:type="simple" xlink:show="embed" xlink:actuate="onLoad" draw:mime-type="application/pdf" loext:page-number="0">
            <text:p/>
          </draw:image>
          <draw:image xlink:href="Pictures/100000010000048000000300FA6162D6.png" xlink:type="simple" xlink:show="embed" xlink:actuate="onLoad" draw:mime-type="image/png"/>
        </draw:frame>
        <draw:frame draw:style-name="gr8" draw:text-style-name="P14" draw:layer="layout" svg:width="11.5cm" svg:height="6.9cm" svg:x="12.5cm" svg:y="4.7cm">
          <draw:image xlink:href="Pictures/100031230000633800003B8827E1C1AF.pdf" xlink:type="simple" xlink:show="embed" xlink:actuate="onLoad" draw:mime-type="application/pdf" loext:page-number="0">
            <text:p/>
          </draw:image>
          <draw:image xlink:href="Pictures/10000001000003C000000240121FA99B.png" xlink:type="simple" xlink:show="embed" xlink:actuate="onLoad" draw:mime-type="image/png"/>
        </draw:frame>
        <draw:frame draw:style-name="gr5" draw:text-style-name="P11" draw:layer="layout" svg:width="1cm" svg:height="1.015cm" svg:x="24.1cm" svg:y="13.601cm">
          <draw:text-box>
            <text:p><text:span text:style-name="T7">5</text:span></text:p>
          </draw:text-box>
        </draw:frame>
        <draw:frame draw:style-name="gr13" draw:text-style-name="P17" draw:layer="layout" svg:width="15.5cm" svg:height="0.919cm" svg:x="7cm" svg:y="12.5cm">
          <draw:text-box>
            <text:p text:style-name="P16"><text:span text:style-name="T9">S. Heimbrodt, Implementierung und Evaluation eines hardwarebeschleunigten Load-Balancers auf einer Nvidia Bluefield DPU Architektur, Bachelorarbe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nutzerdefiniertes_20_Layout">
        <office:forms form:automatic-focus="false" form:apply-design-mode="false"/>
        <draw:custom-shape draw:name="Titel 5" draw:style-name="gr14" draw:text-style-name="P8" draw:layer="layout" svg:width="22.511cm" svg:height="0.899cm" svg:x="1.499cm" svg:y="1.593cm">
          <text:p text:style-name="P7"><text:span text:style-name="T4">XenoFlow 0.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3cm" svg:height="7.369cm" svg:x="10cm" svg:y="3.531cm">
          <draw:image xlink:href="Pictures/1000000100000CC800000628D92421AF.png" xlink:type="simple" xlink:show="embed" xlink:actuate="onLoad" draw:mime-type="image/png">
            <text:p/>
          </draw:image>
        </draw:frame>
        <draw:custom-shape draw:name="Inhaltsplatzhalter 4" draw:style-name="gr15" draw:text-style-name="P13" draw:layer="layout" svg:width="9.409cm" svg:height="10.556cm" svg:x="1.591cm" svg:y="2.944cm">
          <text:list text:style-name="L5">
            <text:list-item>
              <text:p text:style-name="P12"><text:span text:style-name="T6">Entry pro Backend</text:span></text:p>
              <text:p text:style-name="P12"><text:span text:style-name="T6">→ keine PCC</text:span></text:p>
              <text:p text:style-name="P12"><text:span text:style-name="T6">→ keine hinzufügen von Backends zur Laufzeit</text:span></text:p>
            </text:list-item>
            <text:list-item>
              <text:p text:style-name="P12"><text:span text:style-name="T6">L4 Matching auf Source-IP</text:span></text:p>
            </text:list-item>
            <text:list-item>
              <text:p text:style-name="P12"><text:span text:style-name="T6">Anfällig für Struktur die Verteilung beeinflusst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nutzerdefiniertes_20_Layout">
        <office:forms form:automatic-focus="false" form:apply-design-mode="false"/>
        <draw:custom-shape draw:name="Titel 6" draw:style-name="gr16" draw:text-style-name="P8" draw:layer="layout" svg:width="22.511cm" svg:height="0.899cm" svg:x="1.499cm" svg:y="1.593cm">
          <text:p text:style-name="P7"><text:span text:style-name="T4">BlueField-3 Architektu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" draw:style-name="gr17" draw:text-style-name="P13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18" draw:text-style-name="P10" draw:layer="layout" svg:width="22.111cm" svg:height="10.556cm" svg:x="1.59cm" svg:y="2.944cm">
          <text:list text:style-name="L5">
            <text:list-item>
              <text:p text:style-name="P9"><text:span text:style-name="T6">DOCA Flow erstellt Regeln in </text:span><text:span text:style-name="T10">eSwitch</text:span></text:p>
              <text:p text:style-name="P9"><text:span text:style-name="T6">→ wie viele Einträge sind erlaubt?</text:span></text:p>
              <text:p text:style-name="P9"><text:span text:style-name="T6">→ wie schnell können Einträge erstellt werden?</text:span></text:p>
              <text:p text:style-name="P9"><text:span text:style-name="T6">→ Struktur?</text:span></text:p>
            </text:list-item>
            <text:list-item>
              <text:p text:style-name="P9"><text:span text:style-name="T6">Vermuten den eSwitch als ASIC (FPGA?)</text:span></text:p>
            </text:list-item>
            <text:list-item>
              <text:p text:style-name="P9"><text:span text:style-name="T10">DPL Parser</text:span><text:span text:style-name="T11"> extrahiert Header Felder als Hierarchie</text:span></text:p>
              <text:p text:style-name="P18"><text:span text:style-name="T10">→ </text:span><text:span text:style-name="T6">Source/Destination MAC, IP, Ports, Protocol IDs</text:span></text:p>
            </text:list-item>
            <text:list-item>
              <text:p text:style-name="P18"><text:span text:style-name="T10">DPL Table </text:span><text:span text:style-name="T6">definiert Match-Action-Relation</text:span></text:p>
            </text:list-item>
            <text:list-item>
              <text:p text:style-name="P18"><text:span text:style-name="T10">Forwarding Database (FDB) </text:span><text:span text:style-name="T6">enthält eigentlich Weiterleitungsentscheidung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nutzerdefiniertes_20_Layout">
        <office:forms form:automatic-focus="false" form:apply-design-mode="false"/>
        <draw:custom-shape draw:name="Inhaltsplatzhalter 6" draw:style-name="gr19" draw:text-style-name="P13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8.2cm" svg:height="12.476cm" svg:x="4.1cm" svg:y="1.024cm">
          <draw:image xlink:href="Pictures/10000001000005310000038F16B0F45B.png" xlink:type="simple" xlink:show="embed" xlink:actuate="onLoad" draw:mime-type="image/png">
            <text:p/>
          </draw:image>
        </draw:frame>
        <draw:line draw:style-name="gr20" draw:text-style-name="P14" xml:id="id1" draw:id="id1" draw:layer="layout" svg:x1="13.317cm" svg:y1="12.2cm" svg:x2="11.906cm" svg:y2="9.098cm">
          <text:p/>
        </draw:line>
        <draw:line draw:style-name="gr21" draw:text-style-name="P14" xml:id="id2" draw:id="id2" draw:layer="layout" svg:x1="11.906cm" svg:y1="9.098cm" svg:x2="13.89cm" svg:y2="9.084cm">
          <text:p/>
        </draw:line>
        <draw:line draw:style-name="gr21" draw:text-style-name="P14" xml:id="id3" draw:id="id3" draw:layer="layout" svg:x1="13.89cm" svg:y1="9.084cm" svg:x2="15.36cm" svg:y2="9.098cm">
          <text:p/>
        </draw:line>
        <draw:line draw:style-name="gr21" draw:text-style-name="P14" xml:id="id4" draw:id="id4" draw:layer="layout" svg:x1="15.36cm" svg:y1="9.098cm" svg:x2="17.418cm" svg:y2="9.084cm">
          <text:p/>
        </draw:line>
        <draw:line draw:style-name="gr21" draw:text-style-name="P14" xml:id="id5" draw:id="id5" draw:layer="layout" svg:x1="17.418cm" svg:y1="9.084cm" svg:x2="16.169cm" svg:y2="12.2cm">
          <text:p/>
        </draw:line>
        <draw:frame draw:style-name="gr5" draw:text-style-name="P11" draw:layer="layout" svg:width="1cm" svg:height="1.015cm" svg:x="24.1cm" svg:y="13.601cm">
          <draw:text-box>
            <text:p><text:span text:style-name="T7">8</text:span></text:p>
          </draw:text-box>
        </draw:frame>
        <draw:frame draw:style-name="gr22" draw:text-style-name="P17" draw:layer="layout" svg:width="10cm" svg:height="1.253cm" svg:x="1cm" svg:y="12.5cm">
          <draw:text-box>
            <text:p text:style-name="P16"><text:span text:style-name="T9">M. Schrötter, S. Heimbrodt, B. Schnor. XenoFlow: How Fast Can a SmartNIC-Based DNS Load Balancer Run? GI/ITG International Conference on Architecture of Computing Systems (ARCS) 202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8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8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nutzerdefiniertes_20_Layout">
        <office:forms form:automatic-focus="false" form:apply-design-mode="false"/>
        <draw:custom-shape draw:name="Titel 7" draw:style-name="gr23" draw:text-style-name="P8" draw:layer="layout" svg:width="22.511cm" svg:height="0.899cm" svg:x="1.499cm" svg:y="6.393cm">
          <text:p text:style-name="P7"><text:span text:style-name="T4">Experim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nutzerdefiniertes_20_Layout">
        <office:forms form:automatic-focus="false" form:apply-design-mode="false"/>
        <draw:custom-shape draw:name="Titel 8" draw:style-name="gr24" draw:text-style-name="P8" draw:layer="layout" svg:width="22.511cm" svg:height="0.899cm" svg:x="1.499cm" svg:y="1.593cm">
          <text:p text:style-name="P7"><text:span text:style-name="T4">ebpf_mac_rewri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9" draw:style-name="gr25" draw:text-style-name="P10" draw:layer="layout" svg:width="22.111cm" svg:height="4.056cm" svg:x="1.59cm" svg:y="2.944cm">
          <text:list text:style-name="L5">
            <text:list-item>
              <text:p text:style-name="P9"><text:span text:style-name="T11">Schaffung einer eigenen </text:span><text:span text:style-name="T12">Best-Case Baseline </text:span><text:span text:style-name="T11">mithilfe von eBPF</text:span></text:p>
              <text:p text:style-name="P18"><text:span text:style-name="T11">→ „</text:span><text:span text:style-name="T12">run sandboxed programs in a privileged context such as the operating system kernel</text:span><text:span text:style-name="T11">“</text:span></text:p>
              <text:p text:style-name="P18"><text:span text:style-name="T11">→ eBPF hooked an Event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649cm" svg:height="7.034cm" svg:x="5.381cm" svg:y="6.791cm">
          <draw:image xlink:href="Pictures/10000001000005E400000309242396D2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0</text:span></text:p>
          </draw:text-box>
        </draw:frame>
        <draw:frame draw:style-name="gr22" draw:text-style-name="P20" draw:layer="layout" svg:width="4.5cm" svg:height="1cm" svg:x="19.5cm" svg:y="12cm">
          <draw:text-box>
            <text:p text:style-name="P19"><text:span text:style-name="T9">https://ebpf.io/what-is-ebpf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nutzerdefiniertes_20_Layout">
        <office:forms form:automatic-focus="false" form:apply-design-mode="false"/>
        <draw:frame draw:style-name="gr8" draw:text-style-name="P14" draw:layer="layout" svg:width="10.726cm" svg:height="12.636cm" svg:x="1.674cm" svg:y="1cm">
          <draw:image xlink:href="Pictures/10000000000002DA0000035C67902FEC.jpg" xlink:type="simple" xlink:show="embed" xlink:actuate="onLoad" draw:mime-type="image/jpeg">
            <text:p/>
          </draw:image>
        </draw:frame>
        <draw:frame draw:style-name="gr8" draw:text-style-name="P14" draw:layer="layout" svg:width="12cm" svg:height="9.6cm" svg:x="13cm" svg:y="2.5cm">
          <draw:image xlink:href="Pictures/10002BAE0000633800004F6054F36046.pdf" xlink:type="simple" xlink:show="embed" xlink:actuate="onLoad" draw:mime-type="application/pdf" loext:page-number="0">
            <text:p/>
          </draw:image>
          <draw:image xlink:href="Pictures/10000001000003C00000030075EAA883.png" xlink:type="simple" xlink:show="embed" xlink:actuate="onLoad" draw:mime-type="image/png"/>
        </draw:frame>
        <draw:frame draw:style-name="gr5" draw:text-style-name="P11" draw:layer="layout" svg:width="1cm" svg:height="1.015cm" svg:x="24.1cm" svg:y="13.601cm">
          <draw:text-box>
            <text:p><text:span text:style-name="T7">11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nutzerdefiniertes_20_Layout">
        <office:forms form:automatic-focus="false" form:apply-design-mode="false"/>
        <draw:custom-shape draw:name="Titel 9" draw:style-name="gr26" draw:text-style-name="P8" draw:layer="layout" svg:width="22.511cm" svg:height="0.899cm" svg:x="1.499cm" svg:y="1.593cm">
          <text:p text:style-name="P7"><text:span text:style-name="T4">max_pip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8" draw:style-name="gr27" draw:text-style-name="P10" draw:layer="layout" svg:width="22.111cm" svg:height="4.056cm" svg:x="1.59cm" svg:y="2.944cm">
          <text:list text:style-name="L5">
            <text:list-item>
              <text:p text:style-name="P9"><text:span text:style-name="T11">Wie viele Pipes können maximal in Flow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5cm" svg:height="6.643cm" svg:x="1.5cm" svg:y="4.457cm">
          <draw:image xlink:href="Pictures/10000000000005000000017A255F059E.jpg" xlink:type="simple" xlink:show="embed" xlink:actuate="onLoad" draw:mime-type="image/jpeg">
            <text:p/>
          </draw:image>
        </draw:frame>
        <draw:custom-shape draw:name="Inhaltsplatzhalter 10" draw:style-name="gr28" draw:text-style-name="P10" draw:layer="layout" svg:width="22.111cm" svg:height="2cm" svg:x="1.689cm" svg:y="11.5cm">
          <text:list text:style-name="L5">
            <text:list-header>
              <text:p text:style-name="P9"><text:span text:style-name="T11">→ Maximal 505 Pipes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nutzerdefiniertes_20_Layout">
        <office:forms form:automatic-focus="false" form:apply-design-mode="false"/>
        <draw:custom-shape draw:name="Titel 10" draw:style-name="gr29" draw:text-style-name="P8" draw:layer="layout" svg:width="22.511cm" svg:height="0.899cm" svg:x="1.499cm" svg:y="1.593cm">
          <text:p text:style-name="P7"><text:span text:style-name="T4">max_entri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1" draw:style-name="gr30" draw:text-style-name="P10" draw:layer="layout" svg:width="22.111cm" svg:height="4.056cm" svg:x="1.59cm" svg:y="2.944cm">
          <text:list text:style-name="L5">
            <text:list-item>
              <text:p text:style-name="P9"><text:span text:style-name="T11">Wie viele Entries können maximal in Flow pro Pipe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2" draw:style-name="gr31" draw:text-style-name="P10" draw:layer="layout" svg:width="22.111cm" svg:height="1cm" svg:x="1.689cm" svg:y="12.6cm">
          <text:list text:style-name="L5">
            <text:list-header>
              <text:p text:style-name="P9"><text:span text:style-name="T11">→ Maximal 8192 Entries pro Pipe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8cm" svg:height="7.886cm" svg:x="2.7cm" svg:y="4.774cm">
          <draw:image xlink:href="Pictures/10000000000004940000024918356805.jpg" xlink:type="simple" xlink:show="embed" xlink:actuate="onLoad" draw:mime-type="image/jpe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nutzerdefiniertes_20_Layout">
        <office:forms form:automatic-focus="false" form:apply-design-mode="false"/>
        <draw:custom-shape draw:name="Titel 11" draw:style-name="gr32" draw:text-style-name="P8" draw:layer="layout" svg:width="22.511cm" svg:height="0.899cm" svg:x="1.499cm" svg:y="1.593cm">
          <text:p text:style-name="P7"><text:span text:style-name="T4">hash_pip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3" draw:style-name="gr33" draw:text-style-name="P10" draw:layer="layout" svg:width="22.111cm" svg:height="10.056cm" svg:x="1.59cm" svg:y="2.944cm">
          <text:list text:style-name="L5">
            <text:list-item>
              <text:p text:style-name="P9"><text:span text:style-name="T11">Flow-Feature einer Hash Pipe</text:span></text:p>
              <text:p text:style-name="P9"><text:span text:style-name="T11">→ im Prinzip Funktion von XenoFlow bit matching aus der BA</text:span></text:p>
            </text:list-item>
            <text:list-item>
              <text:p text:style-name="P18"><text:span text:style-name="T11">„</text:span><text:span text:style-name="T12">The doca_flow_pipe_hash API allows for creating a pipe where entries are matched by an index, which is typically the result of a hash calculation on the packet.</text:span><text:span text:style-name="T11">“</text:span></text:p>
            </text:list-item>
            <text:list-item>
              <text:p text:style-name="P18"><text:span text:style-name="T11">Hash Algorithmus nicht bekannt und nur begrenzt konfigurierbar</text:span></text:p>
            </text:list-item>
            <text:list-item>
              <text:p text:style-name="P18"><text:span text:style-name="T11">Felder für Hash Nutzung können über Match Feld gesetzt werden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nutzerdefiniertes_20_Layout">
        <office:forms form:automatic-focus="false" form:apply-design-mode="false"/>
        <draw:frame draw:style-name="gr8" draw:text-style-name="P14" draw:layer="layout" svg:width="24.065cm" svg:height="11.298cm" svg:x="0.665cm" svg:y="1.702cm">
          <draw:image xlink:href="Pictures/1000000000000500000002591E24C472.jpg" xlink:type="simple" xlink:show="embed" xlink:actuate="onLoad" draw:mime-type="image/jpe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nutzerdefiniertes_20_Layout">
        <office:forms form:automatic-focus="false" form:apply-design-mode="false"/>
        <draw:custom-shape draw:name="Titel 12" draw:style-name="gr34" draw:text-style-name="P8" draw:layer="layout" svg:width="22.511cm" svg:height="0.899cm" svg:x="1.499cm" svg:y="1.593cm">
          <text:p text:style-name="P7"><text:span text:style-name="T4">PC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4" draw:style-name="gr35" draw:text-style-name="P10" draw:layer="layout" svg:width="22.111cm" svg:height="10.056cm" svg:x="1.59cm" svg:y="2.944cm">
          <text:list text:style-name="L5">
            <text:list-item>
              <text:p text:style-name="P9"><text:span text:style-name="T11">Per-Connection-Consistency</text:span></text:p>
              <text:p text:style-name="P9"><text:span text:style-name="T11">→ Frage ob Verbindungen bei Änderungen von nicht aktivierten Feldern immernoch an <text:s/>das gleiche Backend geschickt werden</text:span></text:p>
              <text:p text:style-name="P9"><text:span text:style-name="T11">→ Relevant für Änderung der Anzahl an Backends</text:span></text:p>
            </text:list-item>
            <text:list-item>
              <text:p text:style-name="P9"><text:span text:style-name="T13">Bucket Semantik aus Katran</text:span><text:span text:style-name="T11"> für Fully Featured Load Balancer</text:span></text:p>
            </text:list-item>
            <text:list-item>
              <text:p text:style-name="P9"><text:span text:style-name="T11">Messung mittels Änderung von Feldern und Beobachtung auf Back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nutzerdefiniertes_20_Layout">
        <office:forms form:automatic-focus="false" form:apply-design-mode="false"/>
        <draw:frame draw:style-name="gr8" draw:text-style-name="P14" draw:layer="layout" svg:width="22.909cm" svg:height="7cm" svg:x="0.091cm" svg:y="0.5cm">
          <draw:image xlink:href="Pictures/1000000100001388000005F84700B506.png" xlink:type="simple" xlink:show="embed" xlink:actuate="onLoad" draw:mime-type="image/png">
            <text:p/>
          </draw:image>
        </draw:frame>
        <draw:frame draw:style-name="gr8" draw:text-style-name="P14" draw:layer="layout" svg:width="23.4cm" svg:height="7.149cm" svg:x="-0.2cm" svg:y="7.039cm">
          <draw:image xlink:href="Pictures/1000000100001388000005F87CF143AF.png" xlink:type="simple" xlink:show="embed" xlink:actuate="onLoad" draw:mime-type="image/png">
            <text:p/>
          </draw:image>
        </draw:frame>
        <draw:line draw:style-name="gr36" draw:text-style-name="P14" draw:layer="layout" svg:x1="13.3cm" svg:y1="6.5cm" svg:x2="13.3cm" svg:y2="8cm">
          <text:p/>
        </draw:line>
        <draw:frame draw:style-name="gr5" draw:text-style-name="P11" draw:layer="layout" svg:width="1cm" svg:height="1.015cm" svg:x="24.1cm" svg:y="13.601cm">
          <draw:text-box>
            <text:p><text:span text:style-name="T7">1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nutzerdefiniertes_20_Layout">
        <office:forms form:automatic-focus="false" form:apply-design-mode="false"/>
        <draw:custom-shape draw:name="Titel 13" draw:style-name="gr37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5" draw:style-name="gr38" draw:text-style-name="P10" draw:layer="layout" svg:width="22.111cm" svg:height="10.056cm" svg:x="1.59cm" svg:y="2.944cm">
          <text:list text:style-name="L5">
            <text:list-item>
              <text:p text:style-name="P9"><text:span text:style-name="T11">Wie lange braucht ein Entry bis es aktiv ist nach der Erstellung in Flow?</text:span></text:p>
            </text:list-item>
            <text:list-item>
              <text:p text:style-name="P9"><text:span text:style-name="T11">Messung eines Packets im Round Trip</text:span></text:p>
              <text:p text:style-name="P9"><text:span text:style-name="T11">→ Für sinnvolle Messung: Clock Sync!</text:span></text:p>
            </text:list-item>
            <text:list-item>
              <text:p text:style-name="P9"><text:span text:style-name="T11">NICs besitzen </text:span><text:span text:style-name="T10">PHC → </text:span><text:span text:style-name="T6">Sync auf Kernel → Sync zwischen Host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5.399cm" svg:height="6.962cm" svg:x="0.001cm" svg:y="6.9cm">
          <draw:image xlink:href="Pictures/10000001000010A800000491A11FC32D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nutzerdefiniertes_20_Layout">
        <office:forms form:automatic-focus="false" form:apply-design-mode="false"/>
        <draw:custom-shape draw:name="Titel 15" draw:style-name="gr39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8" draw:style-name="gr40" draw:text-style-name="P10" draw:layer="layout" svg:width="22.111cm" svg:height="10.056cm" svg:x="1.59cm" svg:y="2.944cm">
          <text:list text:style-name="L5">
            <text:list-item>
              <text:p text:style-name="P9"><text:span text:style-name="T6">Problem</text:span><text:span text:style-name="T11">: PCAP File wird zu groß bei hoher Datenrate für genaue Messung</text:span></text:p>
            </text:list-item>
            <text:list-item>
              <text:p text:style-name="P9"><text:span text:style-name="T11">Idee:</text:span></text:p>
              <text:p text:style-name="P9"><text:span text:style-name="T11">→ random sleep zwischen den Paketen und bilden dann Median über die </text:span><text:span text:style-name="T12">end – start timestamps</text:span></text:p>
              <text:p text:style-name="P9"><text:span text:style-name="T12">→ </text:span><text:span text:style-name="T11">Genau Messung über langen Messzeitraum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nutzerdefiniertes_20_Layout">
        <office:forms form:automatic-focus="false" form:apply-design-mode="false"/>
        <draw:frame draw:style-name="gr8" draw:text-style-name="P14" draw:layer="layout" svg:width="23.057cm" svg:height="12.5cm" svg:x="1.2cm" svg:y="1.1cm">
          <draw:image xlink:href="Pictures/1000000000000500000002B62DB54A6E.jpg" xlink:type="simple" xlink:show="embed" xlink:actuate="onLoad" draw:mime-type="image/jpe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0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nutzerdefiniertes_20_Layout">
        <office:forms form:automatic-focus="false" form:apply-design-mode="false"/>
        <draw:custom-shape draw:name="Inhaltsplatzhalter 16" draw:style-name="gr41" draw:text-style-name="P13" draw:layer="layout" svg:width="22.111cm" svg:height="3.356cm" svg:x="1.59cm" svg:y="1.144cm">
          <text:list text:style-name="L5">
            <text:list-item>
              <text:p text:style-name="P12"><text:span text:style-name="T11">BlueField PHC hat extrem hohen Jitter (32 µs)</text:span></text:p>
            </text:list-item>
            <text:list-item>
              <text:p text:style-name="P12"><text:span text:style-name="T11">Verschlechterte Präzision der Messung</text:span></text:p>
            </text:list-item>
            <text:list-item>
              <text:p text:style-name="P12"><text:span text:style-name="T8">249 </text:span><text:span text:style-name="T11">µs Latenz (Median) zwischen Einfügen und aktiv werden eines Entry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1.502cm" svg:height="8.701cm" svg:x="6.498cm" svg:y="4.7cm">
          <draw:image xlink:href="Pictures/100000010000023B000001B0C2B1A27A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nutzerdefiniertes_20_Layout">
        <office:forms form:automatic-focus="false" form:apply-design-mode="false"/>
        <draw:custom-shape draw:name="Titel 14" draw:style-name="gr42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7" draw:style-name="gr43" draw:text-style-name="P10" draw:layer="layout" svg:width="22.111cm" svg:height="3.556cm" svg:x="1.59cm" svg:y="2.944cm">
          <text:list text:style-name="L5">
            <text:list-item>
              <text:p text:style-name="P9"><text:span text:style-name="T11">PyDFlow</text:span></text:p>
              <text:p text:style-name="P9"><text:span text:style-name="T11">→ Python bindings für DOCA Flow</text:span></text:p>
              <text:p text:style-name="P9"><text:span text:style-name="T11">→ pybind11 Framewor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14" draw:layer="layout" svg:width="20.743cm" svg:height="5.5cm" svg:x="2.5cm" svg:y="7cm">
          <draw:image xlink:href="Pictures/10000001000006C100000104574B3A5D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nutzerdefiniertes_20_Layout">
        <office:forms form:automatic-focus="false" form:apply-design-mode="false"/>
        <draw:custom-shape draw:name="Titel 16" draw:style-name="gr45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9" draw:style-name="gr46" draw:text-style-name="P10" draw:layer="layout" svg:width="22.111cm" svg:height="3.556cm" svg:x="1.59cm" svg:y="2.944cm">
          <text:list text:style-name="L5">
            <text:list-item>
              <text:p text:style-name="P9"><text:span text:style-name="T11">Dashboard</text:span></text:p>
              <text:p text:style-name="P9"><text:span text:style-name="T11">→ XenoFlow Rest-API zum hinzufügen und löschen von Backends</text:span></text:p>
              <text:p text:style-name="P9"><text:span text:style-name="T11">→ Flask Front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cm" svg:height="7.056cm" svg:x="5.2cm" svg:y="6.414cm">
          <draw:image xlink:href="Pictures/100000010000059F000002A5DA63FEEC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nutzerdefiniertes_20_Layout">
        <office:forms form:automatic-focus="false" form:apply-design-mode="false"/>
        <draw:custom-shape draw:name="Titel 17" draw:style-name="gr47" draw:text-style-name="P8" draw:layer="layout" svg:width="22.511cm" svg:height="0.899cm" svg:x="1.499cm" svg:y="1.593cm">
          <text:p text:style-name="P7"><text:span text:style-name="T4">Ausbli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0" draw:style-name="gr48" draw:text-style-name="P10" draw:layer="layout" svg:width="22.111cm" svg:height="10.056cm" svg:x="1.59cm" svg:y="2.944cm">
          <text:list text:style-name="L5">
            <text:list-item>
              <text:p text:style-name="P9"><text:span text:style-name="T11">Einhaltung von PCC mittels VeloxFlow ähnlichem Handover</text:span></text:p>
              <text:p text:style-name="P9"><text:span text:style-name="T11">→ Traffic auf veränderte Buckets auf ARM verarbeitet</text:span></text:p>
              <text:p text:style-name="P9"><text:span text:style-name="T11">→ Neue Buckets werden sofort eingetragen und „scharf“ geschaltet</text:span></text:p>
              <text:p text:style-name="P9"><text:span text:style-name="T11">→ stateful Verbindungen werden auf dem ARM sterben aus</text:span></text:p>
            </text:list-item>
            <text:list-item>
              <text:p text:style-name="P9"><text:span text:style-name="T11">Alles weitere dann in VeloxFlow für QUIC</text:span></text:p>
            </text:list-item>
            <text:list-item>
              <text:p text:style-name="P9"><text:span text:style-name="T11">(KubeProxy auf BlueField)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nutzerdefiniertes_20_Layout">
        <office:forms form:automatic-focus="false" form:apply-design-mode="false"/>
        <draw:frame draw:style-name="gr8" draw:text-style-name="P14" draw:layer="layout" svg:width="18.2cm" svg:height="12.476cm" svg:x="4.1cm" svg:y="1.024cm">
          <draw:image xlink:href="Pictures/10000001000005310000038F16B0F45B.png" xlink:type="simple" xlink:show="embed" xlink:actuate="onLoad" draw:mime-type="image/png">
            <text:p/>
          </draw:image>
        </draw:frame>
        <draw:line draw:style-name="gr49" draw:text-style-name="P14" xml:id="id6" draw:id="id6" draw:layer="layout" svg:x1="13cm" svg:y1="12cm" svg:x2="6cm" svg:y2="6cm">
          <text:p/>
        </draw:line>
        <draw:line draw:style-name="gr50" draw:text-style-name="P14" xml:id="id7" draw:id="id7" draw:layer="layout" svg:x1="10cm" svg:y1="6cm" svg:x2="16cm" svg:y2="9cm">
          <text:p/>
        </draw:line>
        <draw:line draw:style-name="gr51" draw:text-style-name="P14" xml:id="id8" draw:id="id8" draw:layer="layout" svg:x1="13.5cm" svg:y1="12cm" svg:x2="12cm" svg:y2="9cm">
          <text:p/>
        </draw:line>
        <draw:line draw:style-name="gr52" draw:text-style-name="P14" xml:id="id9" draw:id="id9" draw:layer="layout" svg:x1="12cm" svg:y1="9.1cm" svg:x2="14cm" svg:y2="9.1cm">
          <text:p/>
        </draw:line>
        <draw:line draw:style-name="gr53" draw:text-style-name="P14" xml:id="id10" draw:id="id10" draw:layer="layout" svg:x1="13.98cm" svg:y1="9.071cm" svg:x2="15.5cm" svg:y2="9.1cm">
          <text:p/>
        </draw:line>
        <draw:line draw:style-name="gr53" draw:text-style-name="P14" xml:id="id11" draw:id="id11" draw:layer="layout" svg:x1="15.48cm" svg:y1="9.072cm" svg:x2="17.5cm" svg:y2="9.072cm">
          <text:p/>
        </draw:line>
        <draw:line draw:style-name="gr53" draw:text-style-name="P14" xml:id="id12" draw:id="id12" draw:layer="layout" svg:x1="17.5cm" svg:y1="9.072cm" svg:x2="7cm" svg:y2="6cm">
          <text:p/>
        </draw:line>
        <draw:line draw:style-name="gr53" draw:text-style-name="P14" xml:id="id13" draw:id="id13" draw:layer="layout" svg:x1="7cm" svg:y1="6cm" svg:x2="16cm" svg:y2="1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nutzerdefiniertes_20_Layout">
        <office:forms form:automatic-focus="false" form:apply-design-mode="false"/>
        <draw:custom-shape draw:name="Titel 18" draw:style-name="gr54" draw:text-style-name="P8" draw:layer="layout" svg:width="22.511cm" svg:height="0.899cm" svg:x="1.499cm" svg:y="1.593cm">
          <text:p text:style-name="P7"><text:span text:style-name="T4">Faz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1" draw:style-name="gr55" draw:text-style-name="P10" draw:layer="layout" svg:width="22.111cm" svg:height="10.056cm" svg:x="1.59cm" svg:y="2.944cm">
          <text:list text:style-name="L5">
            <text:list-item>
              <text:p text:style-name="P9"><text:span text:style-name="T11">BlueField-3 ermöglicht viel und performantes Offloading</text:span></text:p>
            </text:list-item>
            <text:list-item>
              <text:p text:style-name="P9"><text:span text:style-name="T11">Langsame aber steile Lernkurve</text:span></text:p>
            </text:list-item>
            <text:list-item>
              <text:p text:style-name="P9"><text:span text:style-name="T11">DPA äußerst interessant</text:span></text:p>
            </text:list-item>
            <text:list-item>
              <text:p text:style-name="P9"><text:span text:style-name="T11">Viele offene Fragen bleiben bestehen</text:span></text:p>
              <text:p text:style-name="P9"><text:span text:style-name="T11">→ Weiterhin Flow Source reverse engineering</text:span></text:p>
              <text:p text:style-name="P9"><text:span text:style-name="T11">→ DPA Packet performance je nach Verarbeitung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nutzerdefiniertes_20_Layout">
        <office:forms form:automatic-focus="false" form:apply-design-mode="false"/>
        <draw:custom-shape draw:name="Titel 19" draw:style-name="gr56" draw:text-style-name="P8" draw:layer="layout" svg:width="22.511cm" svg:height="0.899cm" svg:x="1.499cm" svg:y="6.493cm">
          <text:p text:style-name="P7"><text:span text:style-name="T4">Vielen Dank!</text:span></text:p>
          <text:p text:style-name="P7"><text:span text:style-name="T4"/></text:p>
          <text:p text:style-name="P7"><text:span text:style-name="T4">Fragen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de" fo:country="DE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ff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0_und_20_Inhalt-background" style:display-name="Titel und Inha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953cm" fo:margin-right="0cm" fo:margin-top="0.127cm" fo:margin-bottom="0cm" fo:line-height="100%" fo:text-align="left" fo:text-indent="-0.953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Verdana1" style:font-family-asian="Verdana" style:font-family-generic-asian="modern" style:font-pitch-asian="fixed" style:font-size-asian="18pt" style:font-style-asian="normal" style:font-weight-asian="normal" style:font-name-complex="Verdana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Verdana1" style:font-family-asian="Verdana" style:font-family-generic-asian="modern" style:font-pitch-asian="fixed" style:font-size-asian="24pt" style:font-style-asian="normal" style:font-weight-asian="bold" style:font-name-complex="Verdana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enutzerdefiniertes_20_Layout-outline2" style:display-name="Benutzerdefiniertes Layout-outline2" style:family="presentation" style:parent-style-name="Benutzerdefiniertes_20_Layou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3" style:display-name="Benutzerdefiniertes Layout-outline3" style:family="presentation" style:parent-style-name="Benutzerdefiniertes_20_Layou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4" style:display-name="Benutzerdefiniertes Layout-outline4" style:family="presentation" style:parent-style-name="Benutzerdefiniertes_20_Layou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 style:writing-mode="lr-tb">
        <text:list-style style:name="Benutzerdefiniertes_20_Layout-title" style:display-name="Benutzerdefiniertes Layou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2f2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9500"/>
        </loext:fill-complex-color>
      </style:graphic-properties>
    </style:style>
    <style:style style:name="Mgr4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.071cm" svg:stroke-linecap="butt" draw:fill="solid" draw:fill-color="#0080b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3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5cm" fo:padding-bottom="0.125cm" fo:padding-left="0.25cm" fo:padding-right="0.25cm" fo:wrap-option="wrap" loext:decorative="false"/>
      <style:paragraph-properties style:writing-mode="lr-tb"/>
    </style:style>
    <style:style style:name="Mpr7" style:family="presentation" style:parent-style-name="Benutzerdefiniertes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left" style:writing-mode="lr-tb" style:font-independent-line-spacing="true"/>
      <style:text-properties fo:font-variant="normal" fo:text-transform="none" fo:color="#8b8b8b" loext:opacity="100%" style:text-outline="false" style:text-line-through-style="none" style:text-line-through-type="none" style:text-position="0% 100%" style:font-name="Verdana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P7" style:family="paragraph">
      <loext:graphic-properties draw:fill="solid" draw:fill-color="#0080b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text-align="lef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3" style:family="paragraph">
      <style:paragraph-properties fo:margin-left="0.953cm" fo:margin-right="0cm" fo:margin-top="0.127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lef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name-asian="Verdana1" style:font-size-asian="18pt" style:font-style-asian="normal" style:font-weight-asian="normal" style:font-name-complex="Verdana" style:font-size-complex="1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8</text:page-number></text:span></text:p>
        </draw:text-box>
      </draw:frame>
    </style:handout-master>
    <style:master-page style:name="Titel_20_und_20_Inhalt" style:display-name="Titel und Inhalt" style:page-layout-name="PM1" draw:style-name="Mdp1">
      <loext:theme loext:name="Larissa-Design1">
        <loext:theme-colors loext:name="Office 2007-2010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12" draw:style-name="Mgr3" draw:text-style-name="MP5" draw:layer="backgroundobjects" svg:width="25.399cm" svg:height="2.942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4" draw:text-style-name="MP6" draw:layer="backgroundobjects" svg:width="3.769cm" svg:height="0.76cm" svg:x="2.38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4" draw:text-style-name="MP6" draw:layer="backgroundobjects" svg:width="4.108cm" svg:height="0.76cm" svg:x="20.10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6" draw:text-style-name="MP9" draw:layer="backgroundobjects" svg:width="11.2cm" svg:height="0.76cm" svg:x="0.899cm" svg:y="13.584cm">
        <text:p text:style-name="MP8"><text:span text:style-name="MT2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5" draw:style-name="Mgr7" draw:text-style-name="MP10" draw:layer="backgroundobjects" svg:width="8.987cm" svg:height="2.379cm" svg:x="0cm" svg:y="0.563cm">
        <draw:image xlink:href="Pictures/1000000100000579000001737F938937.png" xlink:type="simple" xlink:show="embed" xlink:actuate="onLoad" draw:mime-type="image/png">
          <text:p/>
        </draw:image>
      </draw:frame>
      <draw:frame draw:name="Titel 1" presentation:style-name="Mpr1" draw:text-style-name="MP12" draw:layer="backgroundobjects" svg:width="21.43cm" svg:height="1.655cm" svg:x="1.499cm" svg:y="3.687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Inhaltsplatzhalter 2" presentation:style-name="Mpr2" draw:text-style-name="MP15" draw:layer="backgroundobjects" svg:width="21.43cm" svg:height="6.318cm" svg:x="1.499cm" svg:y="6.227cm" presentation:class="outline" presentation:user-transformed="true">
        <draw:text-box>
          <text:list text:style-name="ML4">
            <text:list-item>
              <text:p text:style-name="MP13"><text:span text:style-name="MT4">Textmasterformat bearbeiten</text:span></text:p>
              <text:list>
                <text:list-item>
                  <text:p text:style-name="MP14"><text:span text:style-name="MT4">Zweite Ebene</text:span></text:p>
                  <text:list>
                    <text:list-item>
                      <text:p text:style-name="MP14"><text:span text:style-name="MT4">Dritte Ebene</text:span></text:p>
                      <text:list>
                        <text:list-item>
                          <text:p text:style-name="MP14"><text:span text:style-name="MT4">Vierte Ebene</text:span></text:p>
                          <text:list>
                            <text:list-item>
                              <text:p text:style-name="MP14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17" draw:layer="backgroundobjects" svg:width="5.926cm" svg:height="0.76cm" svg:x="15.9cm" svg:y="12.84cm" presentation:class="date-time" presentation:user-transformed="true">
        <draw:text-box>
          <text:p text:style-name="MP16"><text:span text:style-name="MT5"><presentation:date-time/></text:span></text:p>
        </draw:text-box>
      </draw:frame>
      <draw:frame draw:name="Foliennummernplatzhalter 5" presentation:style-name="Mpr3" draw:text-style-name="MP17" draw:layer="backgroundobjects" svg:width="1.428cm" svg:height="0.76cm" svg:x="22.701cm" svg:y="12.84cm" presentation:class="page-number" presentation:user-transformed="true">
        <draw:text-box>
          <text:p text:style-name="MP16"><text:span text:style-name="MT5"><text:page-number>28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loext:theme loext:name="Benutzerdefiniertes Design">
        <loext:theme-colors loext:name="Larissa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6" draw:style-name="Mgr3" draw:text-style-name="MP5" draw:layer="backgroundobjects" svg:width="25.399cm" svg:height="0.973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9" draw:layer="backgroundobjects" svg:width="11.2cm" svg:height="0.76cm" svg:x="0.899cm" svg:y="13.584cm">
        <text:p text:style-name="MP8"><text:span text:style-name="MT6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5" draw:text-style-name="MP7" draw:layer="backgroundobjects" svg:width="7.249cm" svg:height="0.299cm" svg:x="0cm" svg:y="0.67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12" draw:layer="backgroundobjects" svg:width="22.859cm" svg:height="2.38cm" svg:x="1.299cm" svg:y="1.543cm" presentation:class="title" presentation:user-transformed="true">
        <draw:text-box>
          <text:p text:style-name="MP11"><text:span text:style-name="MT7">Titelmasterformat durch Klicken bearbeiten</text:span></text:p>
        </draw:text-box>
      </draw:frame>
      <draw:frame presentation:style-name="Benutzerdefiniertes_20_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0.001cm" svg:height="0.001cm" svg:x="0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olie 1</dc:title>
    <meta:initial-creator>faust</meta:initial-creator>
    <meta:editing-cycles>138</meta:editing-cycles>
    <meta:creation-date>2014-03-17T13:14:48</meta:creation-date>
    <dc:date>2026-05-27T12:15:27.050365117</dc:date>
    <meta:editing-duration>PT2H43M33S</meta:editing-duration>
    <meta:generator>LibreOffice/26.2.3.2$Linux_X86_64 LibreOffice_project/620$Build-2</meta:generator>
    <meta:document-statistic meta:object-count="200"/>
    <meta:user-defined meta:name="AppVersion">16.0000</meta:user-defined>
    <meta:user-defined meta:name="Company">HP</meta:user-defined>
    <meta:user-defined meta:name="PresentationFormat">Bildschirmpräsentation (16:9)</meta:user-defined>
    <meta:user-defined meta:name="Slides" meta:value-type="float">3</meta:user-defined>
  </office:meta>
</office:document-meta>
</file>